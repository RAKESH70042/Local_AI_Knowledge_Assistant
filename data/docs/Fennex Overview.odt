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6pt" style:font-size-asian="26pt" style:font-size-complex="26pt"/>
    </style:style>
    <style:style style:name="T3" style:parent-style-name="DefaultParagraphFont" style:family="text">
      <style:text-properties fo:font-weight="bold" style:font-weight-asian="bold" style:font-weight-complex="bold" fo:font-size="26pt" style:font-size-asian="26pt" style:font-size-complex="26pt"/>
    </style:style>
    <style:style style:name="T4" style:parent-style-name="DefaultParagraphFont" style:family="text">
      <style:text-properties fo:font-weight="bold" style:font-weight-asian="bold" style:font-weight-complex="bold" fo:font-size="26pt" style:font-size-asian="26pt" style:font-size-complex="26pt"/>
    </style:style>
    <style:style style:name="T5" style:parent-style-name="DefaultParagraphFont" style:family="text">
      <style:text-properties fo:font-weight="bold" style:font-weight-asian="bold" style:font-weight-complex="bold" fo:font-size="26pt" style:font-size-asian="26pt" style:font-size-complex="26pt"/>
    </style:style>
    <style:style style:name="T6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font-size="18pt" style:font-size-asian="18pt" style:font-size-complex="18pt"/>
    </style:style>
    <style:style style:name="T7" style:parent-style-name="DefaultParagraphFont" style:family="text">
      <style:text-properties style:font-name="Aptos Display" style:font-name-asian="MS Gothic" style:font-name-complex="Times New Roman" fo:font-size="18pt" style:font-size-asian="18pt" style:font-size-complex="18pt"/>
    </style:style>
    <style:style style:name="T8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font-size="18pt" style:font-size-asian="18pt" style:font-size-complex="18pt"/>
    </style:style>
    <style:style style:name="T9" style:parent-style-name="DefaultParagraphFont" style:family="text">
      <style:text-properties style:font-name="Aptos Display" style:font-name-asian="MS Gothic" style:font-name-complex="Times New Roman" fo:font-size="18pt" style:font-size-asian="18pt" style:font-size-complex="18pt"/>
    </style:style>
    <style:style style:name="P10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12" style:parent-style-name="Normal" style:family="paragraph">
      <style:text-properties style:font-name="Aptos Display" style:font-name-asian="MS Gothic" style:font-name-complex="Times New Roman" fo:font-style="italic" style:font-style-asian="italic" style:font-style-complex="italic" fo:font-size="18pt" style:font-size-asian="18pt" style:font-size-complex="18pt"/>
    </style:style>
    <style:style style:name="T13" style:parent-style-name="Heading1Char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14" style:parent-style-name="DefaultParagraphFont" style:family="text">
      <style:text-properties style:font-name="Aptos Display" style:font-name-asian="MS Gothic" style:font-name-complex="Times New Roman" fo:font-style="italic" style:font-style-asian="italic" style:font-style-complex="italic" fo:font-size="18pt" style:font-size-asian="18pt" style:font-size-complex="18pt"/>
    </style:style>
    <style:style style:name="P15" style:parent-style-name="Normal" style:family="paragraph">
      <style:text-properties style:font-name="Aptos Display" style:font-name-asian="MS Gothic" style:font-name-complex="Times New Roman" fo:font-size="18pt" style:font-size-asian="18pt" style:font-size-complex="18pt"/>
    </style:style>
    <style:style style:name="P16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text-transform="uppercase" fo:font-size="16pt" style:font-size-asian="16pt" style:font-size-complex="16pt"/>
    </style:style>
    <style:style style:name="P17" style:parent-style-name="Normal" style:family="paragraph">
      <style:text-properties style:font-name="Aptos Display" style:font-name-asian="MS Gothic" style:font-name-complex="Times New Roman" fo:text-transform="uppercase" fo:font-size="16pt" style:font-size-asian="16pt" style:font-size-complex="16pt"/>
    </style:style>
    <style:style style:name="P18" style:parent-style-name="Normal" style:family="paragraph">
      <style:text-properties style:font-name="Aptos Display" style:font-name-asian="MS Gothic" style:font-name-complex="Times New Roman" fo:text-transform="uppercase" fo:font-size="16pt" style:font-size-asian="16pt" style:font-size-complex="16pt"/>
    </style:style>
    <style:style style:name="P19" style:parent-style-name="Normal" style:family="paragraph">
      <style:text-properties style:font-name="Aptos Display" style:font-name-asian="MS Gothic" style:font-name-complex="Times New Roman" fo:text-transform="uppercase" fo:font-size="16pt" style:font-size-asian="16pt" style:font-size-complex="16pt"/>
    </style:style>
    <style:style style:name="P20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T21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T22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T23" style:parent-style-name="DefaultParagraphFont" style:family="text">
      <style:text-properties style:font-name="Aptos Display" style:font-name-asian="MS Gothic" style:font-name-complex="Times New Roman" fo:text-transform="uppercase" fo:font-size="16pt" style:font-size-asian="16pt" style:font-size-complex="16pt"/>
    </style:style>
    <style:style style:name="T24" style:parent-style-name="DefaultParagraphFont" style:family="text">
      <style:text-properties style:font-name="Aptos Display" style:font-name-asian="MS Gothic" style:font-name-complex="Times New Roman" fo:text-transform="uppercase" fo:font-size="16pt" style:font-size-asian="16pt" style:font-size-complex="16pt"/>
    </style:style>
    <style:style style:name="T25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text-transform="uppercase" fo:font-size="16pt" style:font-size-asian="16pt" style:font-size-complex="16pt"/>
    </style:style>
    <style:style style:name="T26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27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28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29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P30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text-transform="uppercase" fo:font-size="16pt" style:font-size-asian="16pt" style:font-size-complex="16pt"/>
    </style:style>
    <style:style style:name="T31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32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33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34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35" style:parent-style-name="DefaultParagraphFont" style:family="text">
      <style:text-properties style:font-name="Aptos Display" style:font-name-asian="MS Gothic" style:font-name-complex="Times New Roman" fo:text-transform="uppercase" fo:font-size="16pt" style:font-size-asian="16pt" style:font-size-complex="16pt"/>
    </style:style>
    <style:style style:name="P36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text-transform="uppercase" fo:font-size="16pt" style:font-size-asian="16pt" style:font-size-complex="16pt"/>
    </style:style>
    <style:style style:name="P37" style:parent-style-name="Normal" style:family="paragraph">
      <style:text-properties style:font-name="Aptos Display" style:font-name-asian="MS Gothic" style:font-name-complex="Times New Roman" fo:font-size="16pt" style:font-size-asian="16pt" style:font-size-complex="16pt"/>
    </style:style>
    <style:style style:name="P38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text-transform="uppercase" fo:font-size="16pt" style:font-size-asian="16pt" style:font-size-complex="16pt"/>
    </style:style>
    <style:style style:name="T39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40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41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42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text-transform="uppercase" fo:font-size="16pt" style:font-size-asian="16pt" style:font-size-complex="16pt"/>
    </style:style>
    <style:style style:name="T43" style:parent-style-name="DefaultParagraphFont" style:family="text">
      <style:text-properties style:font-name="Aptos Display" style:font-name-asian="MS Gothic" style:font-name-complex="Times New Roman" fo:text-transform="uppercase" fo:font-size="16pt" style:font-size-asian="16pt" style:font-size-complex="16pt"/>
    </style:style>
    <style:style style:name="T44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T47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  <style:style style:name="P48" style:parent-style-name="Normal" style:family="paragraph">
      <style:text-properties style:font-name="Aptos Display" style:font-name-asian="MS Gothic" style:font-name-complex="Times New Roman" fo:font-weight="bold" style:font-weight-asian="bold" style:font-weight-complex="bold" fo:text-transform="uppercase" fo:font-size="16pt" style:font-size-asian="16pt" style:font-size-complex="16pt"/>
    </style:style>
    <style:style style:name="P49" style:parent-style-name="Normal" style:family="paragraph">
      <style:text-properties style:font-name="Aptos Display" style:font-name-asian="MS Gothic" style:font-name-complex="Times New Roman" fo:font-size="16pt" style:font-size-asian="16pt" style:font-size-complex="16pt"/>
    </style:style>
    <style:style style:name="P50" style:parent-style-name="Normal" style:family="paragraph">
      <style:text-properties style:font-name="Aptos Display" style:font-name-asian="MS Gothic" style:font-name-complex="Times New Roman" fo:font-size="16pt" style:font-size-asian="16pt" style:font-size-complex="16pt"/>
    </style:style>
    <style:style style:name="P51" style:parent-style-name="Title" style:family="paragraph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style:font-name="Aptos Display" style:font-name-asian="MS Gothic" style:font-name-complex="Times New Roman" fo:font-weight="bold" style:font-weight-asian="bold" style:font-weight-complex="bold" fo:font-size="16pt" style:font-size-asian="16pt" style:font-size-complex="16pt"/>
    </style:style>
    <style:style style:name="T53" style:parent-style-name="DefaultParagraphFont" style:family="text">
      <style:text-properties style:font-name="Aptos Display" style:font-name-asian="MS Gothic" style:font-name-complex="Times New Roman" fo:font-size="16pt" style:font-size-asian="16pt" style:font-size-complex="16pt"/>
    </style:style>
  </office:automatic-styles>
  <office:body>
    <office:text text:use-soft-page-breaks="true">
      <text:p text:style-name="P1"><text:span text:style-name="T2">Overview</text:span><text:span text:style-name="T3"><text:s/></text:span><text:span text:style-name="T4">of<text:s/></text:span><text:span text:style-name="T5">Fennex</text:span></text:p>
      <text:p text:style-name="Normal"/>
      <text:p text:style-name="Normal"><text:span text:style-name="T6">Fennex<text:s/></text:span><text:span text:style-name="T7">is a UK-based, award-winning industrial software company specializing in cloud-based digital solutions for safety, risk management, and compliance within high-risk industries, particularly energy and renewables.</text:span></text:p>
      <text:p text:style-name="Normal"><text:span text:style-name="T8">Founded in 2016,<text:s/></text:span><text:span text:style-name="T9">the Aberdeen-based firm uses AI-powered tools and real-time data analytics to transform manual safety processes into automated digital workflows, primarily targeting the offshore oil &amp; gas and wind sectors.</text:span></text:p>
      <text:p text:style-name="P10"/>
      <text:p text:style-name="P11">Voice of Adrian Brown, Founder &amp; Managing Director at Fennex</text:p>
      <text:p text:style-name="P12">“At Fennex, we set out to reimagine how complex offshore operations manage safety, risk and compliance. With deep industry experience and a passion for innovation, our team is committed to delivering technology that doesn’t just<text:s/>digitize<text:s/>processes - but improves outcomes."</text:p>
      <text:p text:style-name="Normal"><text:span text:style-name="T13">Goal of Fennex</text:span><text:span text:style-name="T14"><text:s/></text:span></text:p>
      <text:p text:style-name="P15">Fennex creates data-driven solutions to make industries safer, more efficient, and smarter.</text:p>
      <text:p text:style-name="P16">Solution Areas</text:p>
      <text:p text:style-name="P17">1.Health and safety</text:p>
      <text:p text:style-name="P18">2.Risk management</text:p>
      <text:p text:style-name="P19">3.Compliance and assurance</text:p>
      <text:p text:style-name="P20"/>
      <text:p text:style-name="Normal"><text:span text:style-name="T21">Here Are Some Products Provided By Fennex</text:span><text:span text:style-name="T22"><text:s/></text:span></text:p>
      <text:p text:style-name="Normal"><text:span text:style-name="T23"><text:s/></text:span><text:span text:style-name="T24">1.<text:s/></text:span><text:span text:style-name="T25">FennexSafe™</text:span></text:p>
      <text:p text:style-name="Normal"><text:span text:style-name="T26">Fennexsafe™ simplifies environmental, health, safety and assurance processes in one digital suite, reducing complexity,<text:s/></text:span><text:span text:style-name="T27">minimizing</text:span><text:span text:style-name="T28"><text:s/>risk and fostering a proactive safety culture across your<text:s/></text:span><text:span text:style-name="T29">organization</text:span></text:p>
      <text:p text:style-name="P30"><text:s/>2.<text:s/>BBSS™</text:p>
      <text:p text:style-name="Normal"><text:span text:style-name="T31"><text:s/></text:span><text:span text:style-name="T32">BBSS™ (</text:span><text:span text:style-name="T33">behavior</text:span><text:span text:style-name="T34">-based safety solution) is a data-driven, ai-powered safety solution that transforms safety observation data into real-time intelligence for early risk detection, improved reporting and proactive decision making to prevent incidents</text:span><text:span text:style-name="T35">.</text:span></text:p>
      <text:p text:style-name="P36">3.Risk Management Tool</text:p>
      <text:p text:style-name="P37">Fennex’s risk management tool is a cloud-based platform that unifies all types of organizational risk into a single, intelligent system - enabling consistent, real-time and compliant risk governance across high-risk and regulated industries.</text:p>
      <text:p text:style-name="P38"><text:s/>4.<text:s/>Audit and Inspections</text:p>
      <text:p text:style-name="Normal"><text:span text:style-name="T39">Move from reactive, inconsistent assurance practices to proactive,<text:s/></text:span><text:span text:style-name="T40">transparent,</text:span><text:span text:style-name="T41"><text:s/>and efficient compliance management</text:span><text:span text:style-name="T42">.</text:span></text:p>
      <text:p text:style-name="Normal"><text:span text:style-name="T43"><text:s/></text:span><text:span text:style-name="T44">5.<text:s/></text:span><text:span text:style-name="T45">AL PREDICTIVE SAFETY</text:span></text:p>
      <text:p text:style-name="Normal"><text:span text:style-name="T46">Ai-powered predictive safety tool that transforms your data into foresight: anticipate incidents, intervene early, and protect before risks escalate.</text:span></text:p>
      <text:p text:style-name="Normal"><text:span text:style-name="T47">Predict. Prevent. Protect.</text:span></text:p>
      <text:p text:style-name="P48">6.<text:s/>WindSafe™</text:p>
      <text:p text:style-name="P49">Windsafe™ is a unified, data-driven platform that empowers wind operators with full visibility and control across HSEQ, enabling safer operations, stronger compliance and better outcomes.</text:p>
      <text:p text:style-name="P50"/>
      <text:p text:style-name="P51">Why Fennex matters to 366Pi Technologies</text:p>
      <text:p text:style-name="Normal"><text:span text:style-name="T52">F</text:span><text:span text:style-name="T53">ennex is an important client for 366Pi Technologies. We work with them on software development, system management, updates, scaling, and securit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KESH KUMAR VERMA</meta:initial-creator>
    <dc:creator>RAKESH KUMAR VERMA</dc:creator>
    <meta:creation-date>2026-04-13T08:57:00Z</meta:creation-date>
    <dc:date>2026-04-13T08:57:00Z</dc:date>
    <meta:template xlink:href="Normal.dotm" xlink:type="simple"/>
    <meta:editing-cycles>1</meta:editing-cycles>
    <meta:editing-duration>PT0S</meta:editing-duration>
    <meta:document-statistic meta:page-count="1" meta:paragraph-count="5" meta:word-count="374" meta:character-count="2505" meta:row-count="17" meta:non-whitespace-character-count="2136"/>
  </office:meta>
</office:document-meta>
</file>