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ListParagraph" style:family="paragraph">
      <style:text-properties fo:font-size="14pt" style:font-size-asian="14pt" style:font-size-complex="14pt"/>
    </style:style>
    <style:style style:name="P27" style:parent-style-name="ListParagraph" style:family="paragraph">
      <style:text-properties fo:font-size="14pt" style:font-size-asian="14pt" style:font-size-complex="14pt"/>
    </style:style>
    <style:style style:name="P28" style:parent-style-name="ListParagraph" style:family="paragraph"/>
    <style:style style:name="T29" style:parent-style-name="DefaultParagraphFont" style:family="text">
      <style:text-properties style:font-name="Segoe UI" style:font-name-asian="Segoe UI" style:font-name-complex="Segoe UI" fo:color="#323130" fo:font-size="13.5pt" style:font-size-asian="13.5pt" style:font-size-complex="13.5pt"/>
    </style:style>
    <style:style style:name="T30" style:parent-style-name="DefaultParagraphFont" style:family="text">
      <style:text-properties style:font-name="Segoe UI" style:font-name-asian="Segoe UI" style:font-name-complex="Segoe UI" fo:color="#323130" fo:font-size="13.5pt" style:font-size-asian="13.5pt" style:font-size-complex="13.5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ListParagraph" style:family="paragraph"/>
    <style:style style:name="T34" style:parent-style-name="DefaultParagraphFont" style:family="text">
      <style:text-properties style:font-name="Segoe UI" style:font-name-asian="Segoe UI" style:font-name-complex="Segoe UI" fo:color="#323130" fo:font-size="13.5pt" style:font-size-asian="13.5pt" style:font-size-complex="13.5pt"/>
    </style:style>
    <style:style style:name="P35" style:parent-style-name="ListParagraph" style:family="paragraph">
      <style:text-properties fo:font-size="14pt" style:font-size-asian="14pt" style:font-size-complex="14pt"/>
    </style:style>
    <style:style style:name="P36" style:parent-style-name="ListParagraph" style:family="paragraph">
      <style:text-properties fo:font-size="14pt" style:font-size-asian="14pt" style:font-size-complex="14pt"/>
    </style:style>
    <style:style style:name="P37" style:parent-style-name="ListParagraph" style:family="paragraph"/>
    <style:style style:name="T38" style:parent-style-name="DefaultParagraphFont" style:family="text">
      <style:text-properties style:font-name="Segoe UI" style:font-name-asian="Segoe UI" style:font-name-complex="Segoe UI" fo:color="#323130" fo:font-size="13.5pt" style:font-size-asian="13.5pt" style:font-size-complex="13.5pt"/>
    </style:style>
    <style:style style:name="P39" style:parent-style-name="ListParagraph" style:family="paragraph">
      <style:text-properties fo:font-size="14pt" style:font-size-asian="14pt" style:font-size-complex="14pt"/>
    </style:style>
    <style:style style:name="P40" style:parent-style-name="ListParagraph" style:family="paragraph">
      <style:text-properties fo:font-size="14pt" style:font-size-asian="14pt" style:font-size-complex="14pt"/>
    </style:style>
    <style:style style:name="P41" style:parent-style-name="ListParagraph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ListParagraph" style:family="paragraph">
      <style:text-properties fo:font-size="14pt" style:font-size-asian="14pt" style:font-size-complex="14pt"/>
    </style:style>
    <style:style style:name="P44" style:parent-style-name="ListParagraph" style:family="paragraph">
      <style:text-properties fo:font-size="14pt" style:font-size-asian="14pt" style:font-size-complex="14pt"/>
    </style:style>
    <style:style style:name="P45" style:parent-style-name="ListParagraph" style:family="paragraph">
      <style:text-properties fo:font-size="14pt" style:font-size-asian="14pt" style:font-size-complex="14pt"/>
    </style:style>
    <style:style style:name="P46" style:parent-style-name="ListParagraph" style:family="paragraph">
      <style:text-properties fo:font-size="14pt" style:font-size-asian="14pt" style:font-size-complex="14pt"/>
    </style:style>
    <style:style style:name="P47" style:parent-style-name="ListParagraph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style:font-name="Aptos Display" style:font-name-asian="Aptos Display" style:font-name-complex="Aptos Display" fo:font-size="14pt" style:font-size-asian="14pt" style:font-size-complex="14pt"/>
    </style:style>
    <style:style style:name="P49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font-size="18pt" style:font-size-asian="18pt" style:font-size-complex="18pt"/>
    </style:style>
    <style:style style:name="P50" style:parent-style-name="Normal" style:family="paragraph">
      <style:text-properties style:font-name="Aptos Display" style:font-name-asian="MS Gothic" style:font-name-complex="Times New Roman" fo:font-size="18pt" style:font-size-asian="18pt" style:font-size-complex="18pt"/>
    </style:style>
    <style:style style:name="P51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font-size="18pt" style:font-size-asian="18pt" style:font-size-complex="18pt"/>
    </style:style>
    <style:style style:name="P52" style:parent-style-name="Normal" style:family="paragraph">
      <style:text-properties style:font-name="Aptos Display" style:font-name-asian="Aptos Display" style:font-name-complex="Aptos Display" fo:font-size="14pt" style:font-size-asian="14pt" style:font-size-complex="14pt"/>
    </style:style>
  </office:automatic-styles>
  <office:body>
    <office:text text:use-soft-page-breaks="true">
      <text:p text:style-name="P1"><text:span text:style-name="T2">Kid Care</text:span><text:span text:style-name="T3"><text:s/>– Overview</text:span></text:p>
      <text:p text:style-name="Normal"><text:span text:style-name="T4">Kid Care</text:span><text:span text:style-name="T5"><text:s/></text:span><text:span text:style-name="T6">is a healthcare-focused platform designed specifically for newborns and children, addressing critical areas such as growth, nutrition, development, and common illnesses.</text:span></text:p>
      <text:p text:style-name="P7">It connects parents, caregivers, and pediatricians into one unified system to ensure continuous and efficient child healthcare management.</text:p>
      <text:p text:style-name="P8"/>
      <text:p text:style-name="P9">What problem does Kid<text:s/>Care solve?</text:p>
      <text:p text:style-name="P10">Child healthcare is often fragmented across clinics, records, and communication channels<text:s/></text:p>
      <text:p text:style-name="P11">Parents struggle with tracking health, appointments, and medical history<text:s/></text:p>
      <text:p text:style-name="P12">Lack of real-time communication between parents and doctors<text:s/></text:p>
      <text:p text:style-name="P13">Difficulty in managing nutrition, growth, and developmental monitoring<text:s/></text:p>
      <text:p text:style-name="P14">Limited access to organized pediatric care and guidance in one place<text:s/></text:p>
      <text:p text:style-name="P15"/>
      <text:p text:style-name="P16">What Kid<text:s/>Care does (Solution)</text:p>
      <text:p text:style-name="P17">Kid<text:s/>Care provides a centralized digital platform that simplifies child healthcare by integrating:</text:p>
      <text:p text:style-name="P18">Health tracking and medical records<text:s/></text:p>
      <text:p text:style-name="P19">Appointment scheduling and follow-ups<text:s/></text:p>
      <text:p text:style-name="P20">Doctor-parent communication<text:s/></text:p>
      <text:p text:style-name="P21">Receive nutritional suggestions and mental health choices tailored for your child's needs.</text:p>
      <text:p text:style-name="P22">Access medical records and easily manage billing, payments, and insurance information.</text:p>
      <text:p text:style-name="P23"/>
      <text:p text:style-name="P24">Modules in KidCare</text:p>
      <text:p text:style-name="P25">1. For Parents</text:p>
      <text:list text:style-name="LFO2" text:continue-numbering="true">
        <text:list-item>
          <text:p text:style-name="P26">Manage child health: symptoms, tracking, teleconsultation<text:s/></text:p>
        </text:list-item>
        <text:list-item>
          <text:p text:style-name="P27">Book appointments and communicate with doctors<text:s/></text:p>
        </text:list-item>
        <text:list-item>
          <text:p text:style-name="P28"><text:span text:style-name="T29">Our Parent module<text:s/></text:span><text:span text:style-name="TitleChar">ensures<text:s/></text:span><text:span text:style-name="T30">that caring for your child is as seamless as possible.</text:span></text:p>
        </text:list-item>
      </text:list>
      <text:p text:style-name="P31"/>
      <text:p text:style-name="P32">2. For Caregivers</text:p>
      <text:list text:style-name="LFO3" text:continue-numbering="true">
        <text:list-item>
          <text:p text:style-name="P33"><text:span text:style-name="T34">Designed for healthcare professionals involved in childcare, our Caregiver module offers.</text:span></text:p>
        </text:list-item>
        <text:list-item>
          <text:p text:style-name="P35">Access patient data and integrate with EHR systems<text:s/></text:p>
        </text:list-item>
        <text:list-item>
          <text:p text:style-name="P36">Manage appointments, prescriptions, and treatment plans<text:s/></text:p>
        </text:list-item>
        <text:list-item>
          <text:p text:style-name="P37"><text:span text:style-name="T38">Engage with children's activities, parent community, and gather feedback.</text:span></text:p>
        </text:list-item>
        <text:list-item>
          <text:p text:style-name="P39"><text:s/>Track health, recommend tests and procedures, and analyze data for insights.</text:p>
        </text:list-item>
        <text:list-item>
          <text:p text:style-name="P40">Facilitate communication with patients and coordinate emergency responses.</text:p>
        </text:list-item>
        <text:list-item>
          <text:p text:style-name="P41">Handle system upkeep, payment reception, and patient follow-ups.</text:p>
        </text:list-item>
      </text:list>
      <text:p text:style-name="P42">3. For Pediatricians</text:p>
      <text:list text:style-name="LFO1" text:continue-numbering="true">
        <text:list-item>
          <text:p text:style-name="P43">Access patient information, provide pediatric diagnosis and treatment, and offer emergency pediatric care</text:p>
        </text:list-item>
        <text:list-item>
          <text:p text:style-name="P44">Manage appointments and telemedicine consultations<text:s/></text:p>
        </text:list-item>
        <text:list-item>
          <text:p text:style-name="P45">Provide preventive care, nutrition advice, and counseling<text:s/></text:p>
        </text:list-item>
        <text:list-item>
          <text:p text:style-name="P46">Track vaccinations and child health analytics<text:s/></text:p>
        </text:list-item>
        <text:list-item>
          <text:p text:style-name="P47">Refer patients to specialists when required</text:p>
        </text:list-item>
      </text:list>
      <text:p text:style-name="P48"/>
      <text:p text:style-name="P49">Aim of Kid Care for a Better Future</text:p>
      <text:p text:style-name="P50">We are nurturing growth and wellness from infancy to adolescence. We strive to cultivate a healthier community by providing holistic pediatric care, empowering parents through education, and championing the essential role of nutrition, prevention, and early intervention.</text:p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fo:color="#323130" fo:font-size="13.5pt" style:font-size-asian="13.5pt" style:font-size-complex="13.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Char" style:display-name="Title Char" style:family="text"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fo:color="#323130" fo:font-size="13.5pt" style:font-size-asian="13.5pt" style:font-size-complex="13.5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KESH KUMAR VERMA</meta:initial-creator>
    <dc:creator>RAKESH KUMAR VERMA</dc:creator>
    <meta:creation-date>2026-04-13T08:56:00Z</meta:creation-date>
    <dc:date>2026-04-13T08:56:00Z</dc:date>
    <meta:template xlink:href="Normal.dotm" xlink:type="simple"/>
    <meta:editing-cycles>1</meta:editing-cycles>
    <meta:editing-duration>PT0S</meta:editing-duration>
    <meta:document-statistic meta:page-count="1" meta:paragraph-count="5" meta:word-count="376" meta:character-count="2520" meta:row-count="17" meta:non-whitespace-character-count="2149"/>
  </office:meta>
</office:document-meta>
</file>